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0000000F5908BD5CC.png" manifest:media-type="image/png"/>
  <manifest:file-entry manifest:full-path="Pictures/10000000000000F5000000F6F65CFD6A.png" manifest:media-type="image/png"/>
  <manifest:file-entry manifest:full-path="Pictures/1000000000000104000000FD6451B52C.png" manifest:media-type="image/png"/>
  <manifest:file-entry manifest:full-path="Pictures/10000000000000F3000000E161B3DA1B.png" manifest:media-type="image/png"/>
  <manifest:file-entry manifest:full-path="Pictures/10000000000000FB000000E9E619E362.png" manifest:media-type="image/png"/>
  <manifest:file-entry manifest:full-path="Pictures/10000000000000F5000000F24FCC23A2.png" manifest:media-type="image/png"/>
  <manifest:file-entry manifest:full-path="Pictures/1000000000000102000000ED03B579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2d6" officeooo:paragraph-rsid="001592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: <draw:frame draw:style-name="fr2" draw:name="Image1" text:anchor-type="char" svg:x="1.6634in" svg:y="-0.4854in" svg:width="1.9244in" svg:height="1.8425in" draw:z-index="0"><draw:image xlink:href="Pictures/1000000000000102000000ED03B579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1.7457in" svg:y="0.0445in" svg:width="1.7516in" svg:height="1.5972in" draw:z-index="1"><draw:image xlink:href="Pictures/10000000000000FB000000E9E619E362.png" xlink:type="simple" xlink:show="embed" xlink:actuate="onLoad" draw:mime-type="image/png"/></draw:frame></text:p>
      <text:p text:style-name="P1">Pivot: 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1.6693in" svg:y="0.122in" svg:width="1.9626in" svg:height="1.7547in" draw:z-index="2"><draw:image xlink:href="Pictures/10000000000000F3000000E161B3DA1B.png" xlink:type="simple" xlink:show="embed" xlink:actuate="onLoad" draw:mime-type="image/png"/></draw:frame></text:p>
      <text:p text:style-name="P1">“Upper” Arm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1.6319in" svg:y="0.1366in" svg:width="2.0091in" svg:height="1.8189in" draw:z-index="3"><draw:image xlink:href="Pictures/1000000000000104000000FD6451B52C.png" xlink:type="simple" xlink:show="embed" xlink:actuate="onLoad" draw:mime-type="image/png"/></draw:frame></text:p>
      <text:p text:style-name="P1">Lower arm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rist Pitch: <draw:frame draw:style-name="fr3" draw:name="Image5" text:anchor-type="char" svg:x="1.6319in" svg:y="0.0862in" svg:width="2.0134in" svg:height="1.8543in" draw:z-index="5"><draw:image xlink:href="Pictures/10000000000000F5000000F6F65CFD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x="1.6075in" svg:y="0.1563in" svg:width="2.2909in" svg:height="2.0543in" draw:z-index="4"><draw:image xlink:href="Pictures/10000000000000F0000000F5908BD5CC.png" xlink:type="simple" xlink:show="embed" xlink:actuate="onLoad" draw:mime-type="image/png"/></draw:frame></text:p>
      <text:p text:style-name="P1"/>
      <text:p text:style-name="P1">Wrist Roll: </text:p>
      <text:p text:style-name="P1"/>
      <text:p text:style-name="P1"/>
      <text:p text:style-name="P1"/>
      <text:p text:style-name="P1"/>
      <text:p text:style-name="P1"><text:soft-page-break/>Jaw: <draw:frame draw:style-name="fr1" draw:name="Image7" text:anchor-type="char" svg:width="1.8193in" svg:height="1.6799in" draw:z-index="6"><draw:image xlink:href="Pictures/10000000000000F5000000F24FCC23A2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Roman" fo:font-family="'Nimbus Roman'" style:font-pitch="fixed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imbus Roman" fo:font-family="'Nimbus Roman'" style:font-pitch="fixed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" fo:font-family="'Nimbus Roman'" style:font-pitch="fixed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" fo:font-family="'Nimbus Roman'" style:font-pitch="fixed"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4T00:51:12.403734590</meta:creation-date>
    <dc:date>2026-06-04T01:30:52.641682635</dc:date>
    <meta:editing-duration>PT8M50S</meta:editing-duration>
    <meta:editing-cycles>2</meta:editing-cycles>
    <meta:generator>LibreOffice/24.2.7.2$Linux_X86_64 LibreOffice_project/420$Build-2</meta:generator>
    <meta:document-statistic meta:table-count="0" meta:image-count="7" meta:object-count="0" meta:page-count="2" meta:paragraph-count="7" meta:word-count="11" meta:character-count="67" meta:non-whitespace-character-count="56"/>
  </office:meta>
</office:document-meta>
</file>